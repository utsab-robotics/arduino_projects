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2E2F76CEDB.jpg" manifest:media-type="image/jpeg"/>
  <manifest:file-entry manifest:full-path="Pictures/10000000000003A90000030DFDF153F8.jpg" manifest:media-type="image/jpeg"/>
  <manifest:file-entry manifest:full-path="Pictures/100000000000036C000004C59B4A98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text-properties officeooo:paragraph-rsid="00035d1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in" fo:margin-bottom="0in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in" fo:margin-bottom="0in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in" fo:margin-bottom="0in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in" fo:margin-bottom="0in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ANDARD OPERATING PROCEDURE (SOP)</text:h>
      <text:h text:style-name="Heading_20_2" text:outline-level="2">RGB LED Color Control using Arduino</text:h>
      <text:p text:style-name="Horizontal_20_Line"/>
      <text:h text:style-name="Heading_20_2" text:outline-level="2">1. Objective</text:h>
      <text:p text:style-name="Text_20_body">To generate different colors using an RGB LED by controlling Red, Green, and Blue channels with Arduino using PWM.</text:p>
      <text:p text:style-name="Horizontal_20_Line"/>
      <text:h text:style-name="Heading_20_2" text:outline-level="2">2. Components Required</text:h>
      <text:list text:style-name="L15">
        <text:list-item>
          <text:p text:style-name="P33">Arduino Uno </text:p>
        </text:list-item>
        <text:list-item>
          <text:p text:style-name="P33">RGB LED (Common Cathode) </text:p>
        </text:list-item>
        <text:list-item>
          <text:p text:style-name="P33">3 × 220Ω Resistors </text:p>
        </text:list-item>
        <text:list-item>
          <text:p text:style-name="P33">Breadboard </text:p>
        </text:list-item>
        <text:list-item>
          <text:p text:style-name="P33">Jumper wires </text:p>
        </text:list-item>
        <text:list-item>
          <text:p text:style-name="P32">USB cable </text:p>
        </text:list-item>
      </text:list>
      <text:p text:style-name="Horizontal_20_Line"/>
      <text:h text:style-name="Heading_20_2" text:outline-level="2"><text:soft-page-break/>3. Circuit Diagram</text:h>
      <text:p text:style-name="P5"><draw:frame draw:style-name="fr1" draw:name="Image1" text:anchor-type="as-char" svg:width="6.5335in" svg:height="9.1063in" draw:z-index="0"><draw:image xlink:href="Pictures/100000000000036C000004C59B4A9882.jpg" xlink:type="simple" xlink:show="embed" xlink:actuate="onLoad" draw:mime-type="image/jpeg"/><svg:title>https://images.openai.com/static-rsc-4/4JmLtCMyLzko25y5JXLsZRyng1x_6kR9I8VjBpN90oRl9T4FD4QtYtI6OQ3RoLxkpkTl0Ggx3X1YC6fuzI9ugPGVI0aMwBD__sOHbfBsZI9sYBcACR8PFtGsHgVh0mLC1XODsyDeHJ_cyLL4712zpzgN5iHhGIcrLWErTJuL6MZX0PJL8w45_sAcRCJ2oJW9?purpose=fullsize</svg:title></draw:frame></text:p>
      <text:p text:style-name="P5"><text:soft-page-break/><draw:frame draw:style-name="fr1" draw:name="Image2" text:anchor-type="as-char" svg:width="6.3083in" svg:height="5.2583in" draw:z-index="1"><draw:image xlink:href="Pictures/10000000000003A90000030DFDF153F8.jpg" xlink:type="simple" xlink:show="embed" xlink:actuate="onLoad" draw:mime-type="image/jpeg"/><svg:title>https://images.openai.com/static-rsc-4/SLyokfPmebLl5RKjYAav_Re66q7Of7FdnyYpTjL0rBPrcRtxPUYJ9VL2zwfnptk8j2ZjVT01e8bcjPGbTw3opDT-R49vcDQpqXFQyIL-KcG4ZpjQTrpRn2x1BMWzlAEJBf3qq7FDkQM-idP8agIE5vsF_TIXEcdn-vp8nR0LffeSzLXimQfqenqSPz7XXLfd?purpose=fullsize</svg:title></draw:frame></text:p>
      <text:p text:style-name="P5"><text:soft-page-break/><draw:frame draw:style-name="fr1" draw:name="Image3" text:anchor-type="as-char" svg:width="7.1374in" svg:height="4.9783in" draw:z-index="2"><draw:image xlink:href="Pictures/10000000000003200000022E2F76CEDB.jpg" xlink:type="simple" xlink:show="embed" xlink:actuate="onLoad" draw:mime-type="image/jpeg"/><svg:title>https://images.openai.com/static-rsc-4/9xdciQp4gXESNRTroltAIFgb5RqSgVUSDgn7ZUwnQ8I_ldw2ji9fDPm7ZqyyK7JQ68E4H8RZLpDTfMcOBigtUTjRclw2rqDgQhoVTMFIWQyvoZxLBLTWDj1h5-v76AjYQIO-GqitW2Qcgf6uJGtnYhEyOoT6Sp1vACjyJI09LbQENoPm2GaelyJh8RQIaod6?purpose=fullsize</svg:title></draw:frame></text:p>
      <text:p text:style-name="P5">6</text:p>
      <text:p text:style-name="Horizontal_20_Line"/>
      <text:h text:style-name="Heading_20_2" text:outline-level="2">4. Circuit Connections</text:h>
      <text:list text:style-name="L16">
        <text:list-item>
          <text:p text:style-name="P35">Red pin → Arduino pin 6 (via 220Ω resistor) </text:p>
        </text:list-item>
        <text:list-item>
          <text:p text:style-name="P35">Green pin → Arduino pin 5 (via 220Ω resistor) </text:p>
        </text:list-item>
        <text:list-item>
          <text:p text:style-name="P35">Blue pin → Arduino pin 3 (via 220Ω resistor) </text:p>
        </text:list-item>
        <text:list-item>
          <text:p text:style-name="P34">Common cathode → GND </text:p>
        </text:list-item>
      </text:list>
      <text:p text:style-name="Horizontal_20_Line"/>
      <text:h text:style-name="Heading_20_2" text:outline-level="2">5. Arduino Program</text:h>
      <text:section text:style-name="Sect1" text:name="code-block-viewer">
        <text:p text:style-name="P1">int red_pin = 6;</text:p>
        <text:p text:style-name="Preformatted_20_Text">int green_pin = 5;</text:p>
        <text:p text:style-name="Preformatted_20_Text">int blue_pin = 3;</text:p>
        <text:p text:style-name="Preformatted_20_Text">void setup(){</text:p>
        <text:p text:style-name="Preformatted_20_Text"><text:s text:c="2"/>pinMode(red_pin, OUTPUT);</text:p>
        <text:p text:style-name="Preformatted_20_Text"><text:s text:c="2"/>pinMode(green_pin, OUTPUT);</text:p>
        <text:p text:style-name="Preformatted_20_Text"><text:s text:c="2"/>pinMode(blue_pin, OUTPUT);</text:p>
        <text:p text:style-name="Preformatted_20_Text"><text:s text:c="2"/>Serial.begin(9600);</text:p>
        <text:p text:style-name="Preformatted_20_Text">}</text:p>
        <text:p text:style-name="Preformatted_20_Text">void loop(){</text:p>
        <text:p text:style-name="Preformatted_20_Text"><text:s text:c="2"/>// Red Light</text:p>
        <text:p text:style-name="Preformatted_20_Text"><text:s text:c="2"/>analogWrite(red_pin, 0);</text:p>
        <text:p text:style-name="Preformatted_20_Text"><text:s text:c="2"/>analogWrite(green_pin, 255);</text:p>
        <text:p text:style-name="Preformatted_20_Text"><text:s text:c="2"/>analogWrite(blue_pin, 255);</text:p>
        <text:p text:style-name="P2"><text:soft-page-break/>STANDARD OPERATING PROCEDURE (SOP)</text:p>
        <text:p text:style-name="P2">RGB LED Color Control using Arduino</text:p>
        <text:p text:style-name="P2">1. Objective</text:p>
        <text:p text:style-name="P2"/>
        <text:p text:style-name="P2">To generate different colors using an RGB LED by controlling Red, Green, and Blue channels with Arduino using PWM.</text:p>
        <text:p text:style-name="P2"/>
        <text:p text:style-name="P2">2. Components Required</text:p>
        <text:p text:style-name="P2">Arduino Uno</text:p>
        <text:p text:style-name="P2">RGB LED (Common Cathode)</text:p>
        <text:p text:style-name="P2">3 × 220Ω Resistors</text:p>
        <text:p text:style-name="P2">Breadboard</text:p>
        <text:p text:style-name="P2">Jumper wires</text:p>
        <text:p text:style-name="P2">USB cable</text:p>
        <text:p text:style-name="P2">3. Circuit Diagram</text:p>
        <text:p text:style-name="P2">6</text:p>
        <text:p text:style-name="P2">4. Circuit Connections</text:p>
        <text:p text:style-name="P2"><text:soft-page-break/>Red pin → Arduino pin 6 (via 220Ω resistor)</text:p>
        <text:p text:style-name="P2">Green pin → Arduino pin 5 (via 220Ω resistor)</text:p>
        <text:p text:style-name="P2">Blue pin → Arduino pin 3 (via 220Ω resistor)</text:p>
        <text:p text:style-name="P2">Common cathode → GND</text:p>
        <text:p text:style-name="P2">5. Arduino Program</text:p>
        <text:p text:style-name="P2">int red_pin = 6;</text:p>
        <text:p text:style-name="P2">int green_pin = 5;</text:p>
        <text:p text:style-name="P2">int blue_pin = 3;</text:p>
        <text:p text:style-name="P2"/>
        <text:p text:style-name="P2">void setup(){</text:p>
        <text:p text:style-name="P2"><text:s text:c="2"/>pinMode(red_pin, OUTPUT);</text:p>
        <text:p text:style-name="P2"><text:s text:c="2"/>pinMode(green_pin, OUTPUT);</text:p>
        <text:p text:style-name="P2"><text:s text:c="2"/>pinMode(blue_pin, OUTPUT);</text:p>
        <text:p text:style-name="P2"><text:s text:c="2"/>Serial.begin(9600);</text:p>
        <text:p text:style-name="P2">}</text:p>
        <text:p text:style-name="P2"/>
        <text:p text:style-name="P2">void loop(){</text:p>
        <text:p text:style-name="P2"><text:s text:c="2"/>// Red Light</text:p>
        <text:p text:style-name="P2"><text:s text:c="2"/>analogWrite(red_pin, 0);</text:p>
        <text:p text:style-name="P2"><text:s text:c="2"/>analogWrite(green_pin, 255);</text:p>
        <text:p text:style-name="P2"><text:s text:c="2"/>analogWrite(blue_pin, 255);</text:p>
        <text:p text:style-name="P2"><text:s text:c="2"/>delay(1000);</text:p>
        <text:p text:style-name="P2"/>
        <text:p text:style-name="P2"><text:s text:c="2"/>// Green Light</text:p>
        <text:p text:style-name="P2"><text:s text:c="2"/>analogWrite(red_pin, 255);</text:p>
        <text:p text:style-name="P2"><text:s text:c="2"/>analogWrite(green_pin, 0);</text:p>
        <text:p text:style-name="P2"><text:s text:c="2"/>analogWrite(blue_pin, 255);</text:p>
        <text:p text:style-name="P2"><text:s text:c="2"/>delay(1000);</text:p>
        <text:p text:style-name="P2"/>
        <text:p text:style-name="P2"><text:s text:c="2"/>// Blue Light</text:p>
        <text:p text:style-name="P2"><text:s text:c="2"/>analogWrite(red_pin, 255);</text:p>
        <text:p text:style-name="P2"><text:s text:c="2"/>analogWrite(green_pin, 255);</text:p>
        <text:p text:style-name="P2"><text:s text:c="2"/>analogWrite(blue_pin, 0);</text:p>
        <text:p text:style-name="P2"><text:s text:c="2"/>delay(1000);</text:p>
        <text:p text:style-name="P2"/>
        <text:p text:style-name="P2"><text:s text:c="2"/>// Yellow Light</text:p>
        <text:p text:style-name="P2"><text:s text:c="2"/>analogWrite(red_pin, 0);</text:p>
        <text:p text:style-name="P2"><text:s text:c="2"/>analogWrite(green_pin, 0);</text:p>
        <text:p text:style-name="P2"><text:s text:c="2"/>analogWrite(blue_pin, 255);</text:p>
        <text:p text:style-name="P2"><text:s text:c="2"/>delay(1000);</text:p>
        <text:p text:style-name="P2"/>
        <text:p text:style-name="P2"><text:s text:c="2"/>// Purple Light</text:p>
        <text:p text:style-name="P2"><text:soft-page-break/><text:s text:c="2"/>analogWrite(red_pin, 0);</text:p>
        <text:p text:style-name="P2"><text:s text:c="2"/>analogWrite(green_pin, 255);</text:p>
        <text:p text:style-name="P2"><text:s text:c="2"/>analogWrite(blue_pin, 0);</text:p>
        <text:p text:style-name="P2"><text:s text:c="2"/>delay(1000);</text:p>
        <text:p text:style-name="P2"/>
        <text:p text:style-name="P2"><text:s text:c="2"/>// White Light</text:p>
        <text:p text:style-name="P2"><text:s text:c="2"/>analogWrite(red_pin, 0);</text:p>
        <text:p text:style-name="P2"><text:s text:c="2"/>analogWrite(green_pin, 0);</text:p>
        <text:p text:style-name="P2"><text:s text:c="2"/>analogWrite(blue_pin, 0);</text:p>
        <text:p text:style-name="P2"><text:s text:c="2"/>delay(1000);</text:p>
        <text:p text:style-name="P2">}</text:p>
        <text:p text:style-name="P2">6. Working Principle</text:p>
        <text:p text:style-name="P2">RGB LED combines Red, Green, and Blue light to produce different colors.</text:p>
        <text:p text:style-name="P2">Arduino uses PWM (analogWrite) to control brightness of each color.</text:p>
        <text:p text:style-name="P2">PWM values range from 0 to 255:</text:p>
        <text:p text:style-name="P2">0 → Full brightness</text:p>
        <text:p text:style-name="P2">255 → OFF (in this configuration)</text:p>
        <text:p text:style-name="P2">By mixing different values, multiple colors are generated.</text:p>
        <text:p text:style-name="P2">7. Output</text:p>
        <text:p text:style-name="P2"/>
        <text:p text:style-name="P2">The RGB LED will glow in sequence:</text:p>
        <text:p text:style-name="P2"/>
        <text:p text:style-name="P2">Red</text:p>
        <text:p text:style-name="P2">Green</text:p>
        <text:p text:style-name="P2">Blue</text:p>
        <text:p text:style-name="P2">Yellow</text:p>
        <text:p text:style-name="P2">Purple</text:p>
        <text:p text:style-name="P2">White</text:p>
        <text:p text:style-name="P2"/>
        <text:p text:style-name="P2">Each color appears for 1 second and repeats continuously.</text:p>
        <text:p text:style-name="P2"/>
        <text:p text:style-name="P2">8. Precautions</text:p>
        <text:p text:style-name="P2">Use resistors to prevent LED damage.</text:p>
        <text:p text:style-name="P2">Ensure correct identification of RGB pins.</text:p>
        <text:p text:style-name="P2">Use PWM pins (3, 5, 6).</text:p>
        <text:p text:style-name="P2">Confirm LED type (common cathode).</text:p>
        <text:p text:style-name="P2">9. Troubleshooting</text:p>
        <text:p text:style-name="P2"/>
        <text:p text:style-name="P2">Problem: Wrong colors</text:p>
        <text:p text:style-name="P2">Solution: Check wiring or LED type</text:p>
        <text:p text:style-name="P2"/>
        <text:p text:style-name="P2">Problem: LED not glowing</text:p>
        <text:p text:style-name="P2">Solution: Verify connections and power</text:p>
        <text:p text:style-name="P2"/>
        <text:p text:style-name="P2">Problem: Dim light</text:p>
        <text:p text:style-name="P2">Solution: Adjust PWM values</text:p>
        <text:p text:style-name="P2"/>
        <text:p text:style-name="P2">Problem: Only one color working</text:p>
        <text:p text:style-name="P2">Solution: Check individual pins</text:p>
        <text:p text:style-name="P2"/>
        <text:p text:style-name="P2">10. Improvement Ideas</text:p>
        <text:p text:style-name="P2">Smooth color fading (rainbow effect)</text:p>
        <text:p text:style-name="P2">Control colors using Serial Monitor</text:p>
        <text:p text:style-name="P2">Add potentiometer for brightness control</text:p>
        <text:p text:style-name="P2">Bluetooth control via mobil <text:s/>delay(1000);</text:p>
        <text:p text:style-name="Preformatted_20_Text"><text:s text:c="2"/>// Green Light</text:p>
        <text:p text:style-name="Preformatted_20_Text"><text:s text:c="2"/>analogWrite(red_pin, 255);</text:p>
        <text:p text:style-name="Preformatted_20_Text"><text:s text:c="2"/>analogWrite(green_pin, 0);</text:p>
        <text:p text:style-name="Preformatted_20_Text"><text:s text:c="2"/>analogWrite(blue_pin, 255);</text:p>
        <text:p text:style-name="Preformatted_20_Text"><text:s text:c="2"/>delay(1000);</text:p>
        <text:p text:style-name="Preformatted_20_Text"><text:s text:c="2"/>// Blue Light</text:p>
        <text:p text:style-name="Preformatted_20_Text"><text:s text:c="2"/>analogWrite(red_pin, 255);</text:p>
        <text:p text:style-name="Preformatted_20_Text"><text:s text:c="2"/>analogWrite(green_pin, 255);</text:p>
        <text:p text:style-name="Preformatted_20_Text"><text:s text:c="2"/>analogWrite(blue_pin, 0);</text:p>
        <text:p text:style-name="Preformatted_20_Text"><text:soft-page-break/><text:s text:c="2"/>delay(1000);</text:p>
        <text:p text:style-name="Preformatted_20_Text"><text:s text:c="2"/>// Yellow Light</text:p>
        <text:p text:style-name="Preformatted_20_Text"><text:s text:c="2"/>analogWrite(red_pin, 0);</text:p>
        <text:p text:style-name="Preformatted_20_Text"><text:s text:c="2"/>analogWrite(green_pin, 0);</text:p>
        <text:p text:style-name="Preformatted_20_Text"><text:s text:c="2"/>analogWrite(blue_pin, 255);</text:p>
        <text:p text:style-name="Preformatted_20_Text"><text:s text:c="2"/>delay(1000);</text:p>
        <text:p text:style-name="Preformatted_20_Text"><text:s text:c="2"/>// Purple Light</text:p>
        <text:p text:style-name="Preformatted_20_Text"><text:s text:c="2"/>analogWrite(red_pin, 0);</text:p>
        <text:p text:style-name="Preformatted_20_Text"><text:s text:c="2"/>analogWrite(green_pin, 255);</text:p>
        <text:p text:style-name="Preformatted_20_Text"><text:s text:c="2"/>analogWrite(blue_pin, 0);</text:p>
        <text:p text:style-name="Preformatted_20_Text"><text:s text:c="2"/>delay(1000);</text:p>
        <text:p text:style-name="Preformatted_20_Text"><text:s text:c="2"/>// White Light</text:p>
        <text:p text:style-name="Preformatted_20_Text"><text:s text:c="2"/>analogWrite(red_pin, 0);</text:p>
        <text:p text:style-name="Preformatted_20_Text"><text:s text:c="2"/>analogWrite(green_pin, 0);</text:p>
        <text:p text:style-name="Preformatted_20_Text"><text:s text:c="2"/>analogWrite(blue_pin, 0);</text:p>
        <text:p text:style-name="Preformatted_20_Text"><text:s text:c="2"/>delay(1000);</text:p>
        <text:p text:style-name="Preformatted_20_Text">}</text:p>
      </text:section>
      <text:p text:style-name="Horizontal_20_Line"/>
      <text:h text:style-name="Heading_20_2" text:outline-level="2">6. Working Principle</text:h>
      <text:list text:style-name="L17">
        <text:list-item>
          <text:p text:style-name="P37">RGB LED combines Red, Green, and Blue light to produce different colors. </text:p>
        </text:list-item>
        <text:list-item>
          <text:p text:style-name="P37">Arduino uses PWM (<text:span text:style-name="Source_20_Text">analogWrite</text:span>) to control brightness of each color. </text:p>
        </text:list-item>
        <text:list-item>
          <text:p text:style-name="P37">PWM values range from 0 to 255: </text:p>
          <text:list>
            <text:list-item>
              <text:p text:style-name="P37">0 → Full brightness </text:p>
            </text:list-item>
            <text:list-item>
              <text:p text:style-name="P37">255 → OFF (in this configuration) </text:p>
            </text:list-item>
          </text:list>
        </text:list-item>
        <text:list-item>
          <text:p text:style-name="P36">By mixing different values, multiple colors are generated. </text:p>
        </text:list-item>
      </text:list>
      <text:p text:style-name="Horizontal_20_Line"/>
      <text:h text:style-name="Heading_20_2" text:outline-level="2">7. Output</text:h>
      <text:p text:style-name="Text_20_body">The RGB LED will glow in sequence:</text:p>
      <text:list text:style-name="L18">
        <text:list-item>
          <text:p text:style-name="P39">Red </text:p>
        </text:list-item>
        <text:list-item>
          <text:p text:style-name="P39">Green </text:p>
        </text:list-item>
        <text:list-item>
          <text:p text:style-name="P39">Blue </text:p>
        </text:list-item>
        <text:list-item>
          <text:p text:style-name="P39">Yellow </text:p>
        </text:list-item>
        <text:list-item>
          <text:p text:style-name="P39">Purple </text:p>
        </text:list-item>
        <text:list-item>
          <text:p text:style-name="P38">White </text:p>
        </text:list-item>
      </text:list>
      <text:p text:style-name="Text_20_body">Each color appears for 1 second and repeats continuously.</text:p>
      <text:p text:style-name="Horizontal_20_Line"/>
      <text:h text:style-name="Heading_20_2" text:outline-level="2">8. Precautions</text:h>
      <text:list text:style-name="L19">
        <text:list-item>
          <text:p text:style-name="P41">Use resistors to prevent LED damage. </text:p>
        </text:list-item>
        <text:list-item>
          <text:p text:style-name="P41">Ensure correct identification of RGB pins. </text:p>
        </text:list-item>
        <text:list-item>
          <text:p text:style-name="P41">Use PWM pins (3, 5, 6). </text:p>
        </text:list-item>
        <text:list-item>
          <text:p text:style-name="P40">Confirm LED type (common cathode). </text:p>
        </text:list-item>
      </text:list>
      <text:p text:style-name="Horizontal_20_Line"/>
      <text:h text:style-name="Heading_20_2" text:outline-level="2"><text:soft-page-break/>9. Troubleshooting</text:h>
      <text:p text:style-name="Text_20_body">Problem: Wrong colors<text:line-break/>Solution: Check wiring or LED type</text:p>
      <text:p text:style-name="Text_20_body">Problem: LED not glowing<text:line-break/>Solution: Verify connections and power</text:p>
      <text:p text:style-name="Text_20_body">Problem: Dim light<text:line-break/>Solution: Adjust PWM values</text:p>
      <text:p text:style-name="Text_20_body">Problem: Only one color working<text:line-break/>Solution: Check individual pins</text:p>
      <text:p text:style-name="Horizontal_20_Line"/>
      <text:h text:style-name="Heading_20_2" text:outline-level="2">10. Improvement Ideas</text:h>
      <text:list text:style-name="L20">
        <text:list-item>
          <text:p text:style-name="P43">Smooth color fading (rainbow effect) </text:p>
        </text:list-item>
        <text:list-item>
          <text:p text:style-name="P43">Control colors using Serial Monitor </text:p>
        </text:list-item>
        <text:list-item>
          <text:p text:style-name="P43">Add potentiometer for brightness control </text:p>
        </text:list-item>
        <text:list-item>
          <text:p text:style-name="P42">Bluetooth control via mobil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7:49:33.651108491</meta:creation-date>
    <dc:date>2026-04-04T17:54:22.215500353</dc:date>
    <meta:editing-duration>PT4M48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9" meta:paragraph-count="188" meta:word-count="694" meta:character-count="4773" meta:non-whitespace-character-count="4130"/>
  </office:meta>
</office:document-meta>
</file>