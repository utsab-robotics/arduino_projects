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0000001C29DA1E9A4.jpg" manifest:media-type="image/jpeg"/>
  <manifest:file-entry manifest:full-path="Pictures/100000000000034B000002ECEBBD108B.jpg" manifest:media-type="image/jpeg"/>
  <manifest:file-entry manifest:full-path="Pictures/10000000000005D60000035C9ED4A81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in" fo:margin-right="0in" fo:text-indent="0in" style:auto-text-indent="false"/>
    </style:style>
    <style:style style:name="P2" style:family="paragraph" style:parent-style-name="Preformatted_20_Text">
      <style:paragraph-properties fo:margin-left="0in" fo:margin-right="0in" fo:text-indent="0in" style:auto-text-indent="false"/>
    </style:style>
    <style:style style:name="P3" style:family="paragraph" style:parent-style-name="Preformatted_20_Text" style:list-style-name="L3">
      <style:paragraph-properties fo:margin-left="0in" fo:margin-right="0in" fo:text-indent="0in" style:auto-text-indent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>
      <style:paragraph-properties fo:margin-top="0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in" fo:margin-bottom="0in" style:contextual-spacing="false"/>
    </style:style>
    <style:style style:name="P14" style:family="paragraph" style:parent-style-name="Text_20_body">
      <style:paragraph-properties fo:margin-left="0in" fo:margin-right="0in" fo:text-indent="0in" style:auto-text-indent="false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16" style:family="paragraph" style:parent-style-name="Text_20_body" style:list-style-name="L11"/>
    <style:style style:name="P17" style:family="paragraph" style:parent-style-name="Text_20_body" style:list-style-name="L11">
      <style:paragraph-properties fo:margin-top="0in" fo:margin-bottom="0in" style:contextual-spacing="false"/>
    </style:style>
    <style:style style:name="P18" style:family="paragraph" style:parent-style-name="Text_20_body" style:list-style-name="L12"/>
    <style:style style:name="P19" style:family="paragraph" style:parent-style-name="Text_20_body" style:list-style-name="L12">
      <style:paragraph-properties fo:margin-top="0in" fo:margin-bottom="0in" style:contextual-spacing="false"/>
    </style:style>
    <style:style style:name="P20" style:family="paragraph" style:parent-style-name="Text_20_body" style:list-style-name="L13"/>
    <style:style style:name="P21" style:family="paragraph" style:parent-style-name="Text_20_body" style:list-style-name="L13">
      <style:paragraph-properties fo:margin-top="0in" fo:margin-bottom="0in" style:contextual-spacing="false"/>
    </style:style>
    <style:style style:name="P22" style:family="paragraph" style:parent-style-name="Text_20_body" style:list-style-name="L14"/>
    <style:style style:name="P23" style:family="paragraph" style:parent-style-name="Text_20_body" style:list-style-name="L14">
      <style:paragraph-properties fo:margin-top="0in" fo:margin-bottom="0in" style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TANDARD OPERATING PROCEDURE (SOP)</text:h>
      <text:h text:style-name="Heading_20_2" text:outline-level="2">Display “Hello World” on 16x2 LCD using Arduino</text:h>
      <text:p text:style-name="Horizontal_20_Line"/>
      <text:h text:style-name="Heading_20_2" text:outline-level="2">1. Objective</text:h>
      <text:p text:style-name="Text_20_body">To display the text “Hello World” on a 16x2 LCD using an Arduino Uno.</text:p>
      <text:p text:style-name="Horizontal_20_Line"/>
      <text:h text:style-name="Heading_20_2" text:outline-level="2">2. Components Required</text:h>
      <text:list text:style-name="L11">
        <text:list-item>
          <text:p text:style-name="P17">Arduino Uno </text:p>
        </text:list-item>
        <text:list-item>
          <text:p text:style-name="P17">16x2 LCD Display (HD44780 compatible) </text:p>
        </text:list-item>
        <text:list-item>
          <text:p text:style-name="P17">10kΩ Potentiometer </text:p>
        </text:list-item>
        <text:list-item>
          <text:p text:style-name="P17">Breadboard </text:p>
        </text:list-item>
        <text:list-item>
          <text:p text:style-name="P17">Jumper wires </text:p>
        </text:list-item>
        <text:list-item>
          <text:p text:style-name="P16">USB cable </text:p>
        </text:list-item>
      </text:list>
      <text:p text:style-name="Horizontal_20_Line"/>
      <text:h text:style-name="Heading_20_2" text:outline-level="2"><text:soft-page-break/>3. Circuit Diagram</text:h>
      <text:p text:style-name="P6"><draw:frame draw:style-name="fr1" draw:name="Image1" text:anchor-type="as-char" svg:width="15.5626in" svg:height="8.9583in" draw:z-index="0"><draw:image xlink:href="Pictures/10000000000005D60000035C9ED4A81D.jpg" xlink:type="simple" xlink:show="embed" xlink:actuate="onLoad" draw:mime-type="image/jpeg"/><svg:title>https://images.openai.com/static-rsc-4/6Ja6h-9HdP4lOFp_Um3-d_HAW9BTOpnhVGnEjt3uf5XpI7ijNSs9igo2XZebGxi9cA1MsFdRejGf9gKKCMQhlVVNISMMeIW19TkIQw2izNxXEBia_zZXZBqwtkpCMVpR7neG65fa5RexZQZUDnu3uTpxcg65Zo6EuJ_iaHES1YLk837f_S5-ADs7U8Q7OAwo?purpose=fullsize</svg:title></draw:frame></text:p>
      <text:p text:style-name="P6"><text:soft-page-break/><draw:frame draw:style-name="fr2" draw:name="Image2" text:anchor-type="as-char" svg:width="6.6161in" svg:height="5.8709in" draw:z-index="1"><draw:image xlink:href="Pictures/100000000000034B000002ECEBBD108B.jpg" xlink:type="simple" xlink:show="embed" xlink:actuate="onLoad" draw:mime-type="image/jpeg"/><svg:title>https://images.openai.com/static-rsc-4/GZdF8S-BhkD8RtLu6eg2nOdmE4ZNdFjZIJlwQBlkztFJOW-nPCWWGNC-PBQAmEV2TwejCVwoOpkT7YNLhQzM6z0KqziLZQh2TP1dB2aCQbFtTSinPVMnxNn5SepR2Qy_JRzRJH41elytFb5sB4vAmInf1VzAG5laKw_8Zlxk11KKhK39uM8ePa3_r65w9Pdh?purpose=fullsize</svg:title></draw:frame></text:p>
      <text:p text:style-name="P6"><text:soft-page-break/><draw:frame draw:style-name="fr1" draw:name="Image3" text:anchor-type="as-char" svg:width="4.1665in" svg:height="4.6874in" draw:z-index="2"><draw:image xlink:href="Pictures/1000000000000190000001C29DA1E9A4.jpg" xlink:type="simple" xlink:show="embed" xlink:actuate="onLoad" draw:mime-type="image/jpeg"/><svg:title>https://images.openai.com/static-rsc-4/wgN5gPZSWDCEWd00425-oVAgqjk26d_wc6VVPy90alkT39A9rO-s1yUw3mWySk-GlEx3M3v3jC-h1Aq2TCkcGGII_d3IUD-TJKGRpPNZJ6zApE0kUbq6_BufqRHzCxTG6GVw1yBvlKfd3r1JJKMJXjjsfW0SeI9GL-yKkof-KmLHxd0FPZk85Y4rnl76NGp5?purpose=fullsize</svg:title></draw:frame></text:p>
      <text:p text:style-name="P6">6</text:p>
      <text:p text:style-name="Horizontal_20_Line"/>
      <text:h text:style-name="Heading_20_2" text:outline-level="2">4. Circuit Connections</text:h>
      <text:p text:style-name="Text_20_body">LCD Pin Configuration:</text:p>
      <text:p text:style-name="Text_20_body">1 (VSS) → GND<text:line-break/>2 (VDD) → 5V<text:line-break/>3 (V0) → Middle pin of potentiometer (contrast control)<text:line-break/>4 (RS) → Arduino pin 12<text:line-break/>5 (RW) → GND<text:line-break/>6 (E) → Arduino pin 11<text:line-break/>11 (D4) → Arduino pin 5<text:line-break/>12 (D5) → Arduino pin 4<text:line-break/>13 (D6) → Arduino pin 3<text:line-break/>14 (D7) → Arduino pin 2<text:line-break/>15 (A) → 5V (via resistor, optional)<text:line-break/>16 (K) → GND</text:p>
      <text:p text:style-name="Text_20_body">Potentiometer:</text:p>
      <text:list text:style-name="L12">
        <text:list-item>
          <text:p text:style-name="P19">One side → 5V </text:p>
        </text:list-item>
        <text:list-item>
          <text:p text:style-name="P19">Other side → GND </text:p>
        </text:list-item>
        <text:list-item>
          <text:p text:style-name="P18">Middle → V0 (Pin 3 of LCD) </text:p>
        </text:list-item>
      </text:list>
      <text:p text:style-name="Horizontal_20_Line"/>
      <text:h text:style-name="Heading_20_2" text:outline-level="2"><text:soft-page-break/>5. Arduino Program</text:h>
      <text:section text:style-name="Sect1" text:name="code-block-viewer">
        <text:p text:style-name="P2">#include &lt;LiquidCrystal.h&gt;</text:p>
        <text:p text:style-name="Preformatted_20_Text">// RS, E, D4, D5, D6, D7</text:p>
        <text:p text:style-name="Preformatted_20_Text">LiquidCrystal lcd(12, 11, 5, 4, 3, 2);</text:p>
        <text:p text:style-name="Preformatted_20_Text">void setup(){</text:p>
        <text:p text:style-name="Preformatted_20_Text"><text:s text:c="2"/>lcd.begin(16, 2);</text:p>
        <text:p text:style-name="Preformatted_20_Text">}</text:p>
        <text:p text:style-name="Preformatted_20_Text">void loop(){</text:p>
        <text:p text:style-name="Preformatted_20_Text"><text:s text:c="2"/>lcd.setCursor(0,0);</text:p>
        <text:p text:style-name="Preformatted_20_Text"><text:s text:c="2"/>lcd.print("Hello World");</text:p>
        <text:p text:style-name="Preformatted_20_Text">}</text:p>
      </text:section>
      <text:p text:style-name="Horizontal_20_Line"/>
      <text:h text:style-name="Heading_20_2" text:outline-level="2">6. Working Principle</text:h>
      <text:list text:style-name="L13">
        <text:list-item>
          <text:p text:style-name="P21">The Arduino initializes the LCD using <text:span text:style-name="Source_20_Text">lcd.begin(16, 2)</text:span>. </text:p>
        </text:list-item>
        <text:list-item>
          <text:p text:style-name="P21">The cursor is set to the first row and first column using <text:span text:style-name="Source_20_Text">lcd.setCursor(0,0)</text:span>. </text:p>
        </text:list-item>
        <text:list-item>
          <text:p text:style-name="P21">The text “Hello World” is displayed using <text:span text:style-name="Source_20_Text">lcd.print()</text:span>. </text:p>
        </text:list-item>
        <text:list-item>
          <text:p text:style-name="P20">The LCD works in <text:span text:style-name="Strong_20_Emphasis">4-bit mode</text:span>, using pins D4–D7 for data transfer. </text:p>
        </text:list-item>
      </text:list>
      <text:p text:style-name="Horizontal_20_Line"/>
      <text:h text:style-name="Heading_20_2" text:outline-level="2">7. Output</text:h>
      <text:p text:style-name="Text_20_body">The LCD will display:</text:p>
      <text:p text:style-name="Text_20_body">Hello World</text:p>
      <text:p text:style-name="Horizontal_20_Line"/>
      <text:h text:style-name="Heading_20_2" text:outline-level="2">8. Precautions</text:h>
      <text:list text:style-name="L14">
        <text:list-item>
          <text:p text:style-name="P23">Ensure all wiring connections are correct. </text:p>
        </text:list-item>
        <text:list-item>
          <text:p text:style-name="P23">Adjust the potentiometer for proper contrast. </text:p>
        </text:list-item>
        <text:list-item>
          <text:p text:style-name="P23">Connect RW pin to GND. </text:p>
        </text:list-item>
        <text:list-item>
          <text:p text:style-name="P22">Use a stable 5V power supply. </text:p>
        </text:list-item>
      </text:list>
      <text:p text:style-name="Horizontal_20_Line"/>
      <text:h text:style-name="Heading_20_2" text:outline-level="2">9. Troubleshooting</text:h>
      <text:p text:style-name="Text_20_body">Problem: No display<text:line-break/>Solution: Adjust contrast or check wiring</text:p>
      <text:p text:style-name="Text_20_body">Problem: Only black boxes visible<text:line-break/>Solution: LCD initialized but data not sent properly</text:p>
      <text:p text:style-name="Text_20_body">Problem: Flickering<text:line-break/>Solution: Avoid using <text:span text:style-name="Source_20_Text">lcd.clear()</text:span> repeatedly</text:p>
      <text:p text:style-name="Text_20_body">Problem: Backlight not glowing<text:line-break/>Solution: Check pins 15 (A) and 16 (K)</text:p>
      <text:p text:style-name="P14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4T17:04:54.751495456</meta:creation-date>
    <dc:date>2026-04-04T17:11:12.873994241</dc:date>
    <meta:editing-duration>PT6M18S</meta:editing-duration>
    <meta:editing-cycles>1</meta:editing-cycles>
    <meta:document-statistic meta:table-count="0" meta:image-count="3" meta:object-count="0" meta:page-count="6" meta:paragraph-count="52" meta:word-count="307" meta:character-count="1696" meta:non-whitespace-character-count="1433"/>
    <meta:generator>LibreOffice/24.2.7.2$Linux_X86_64 LibreOffice_project/420$Build-2</meta:generator>
  </office:meta>
</office:document-meta>
</file>