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C0000035C0C0DF8F8.jpg" manifest:media-type="image/jpeg"/>
  <manifest:file-entry manifest:full-path="Pictures/100000000000022100000320FDE3E07E.jpg" manifest:media-type="image/jpeg"/>
  <manifest:file-entry manifest:full-path="Pictures/10000000000007990000035C81F04DC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ANDARD OPERATING PROCEDURE (SOP)</text:h>
      <text:h text:style-name="Heading_20_2" text:outline-level="2">RGB LED Color Control using Arduino (PWM)</text:h>
      <text:p text:style-name="Horizontal_20_Line"/>
      <text:h text:style-name="Heading_20_2" text:outline-level="2">1. Objective</text:h>
      <text:p text:style-name="Text_20_body">To generate different colors using an RGB LED by controlling intensity of Red, Green, and Blue channels using PWM in Arduino.</text:p>
      <text:p text:style-name="Horizontal_20_Line"/>
      <text:h text:style-name="Heading_20_2" text:outline-level="2">2. Components Required</text:h>
      <text:list text:style-name="L8">
        <text:list-item>
          <text:p text:style-name="P18">Arduino Uno </text:p>
        </text:list-item>
        <text:list-item>
          <text:p text:style-name="P18">RGB LED (Common Cathode recommended) </text:p>
        </text:list-item>
        <text:list-item>
          <text:p text:style-name="P18">3 × 220Ω Resistors </text:p>
        </text:list-item>
        <text:list-item>
          <text:p text:style-name="P18">Breadboard </text:p>
        </text:list-item>
        <text:list-item>
          <text:p text:style-name="P18">Jumper wires </text:p>
        </text:list-item>
        <text:list-item>
          <text:p text:style-name="P17">USB cable </text:p>
        </text:list-item>
      </text:list>
      <text:p text:style-name="Horizontal_20_Line"/>
      <text:h text:style-name="Heading_20_2" text:outline-level="2">3. Circuit Diagram</text:h>
      <text:p text:style-name="P4"><draw:frame draw:style-name="fr1" draw:name="Image1" text:anchor-type="as-char" svg:width="7.0075in" svg:height="3.0992in" draw:z-index="0"><draw:image xlink:href="Pictures/10000000000007990000035C81F04DC7.jpg" xlink:type="simple" xlink:show="embed" xlink:actuate="onLoad" draw:mime-type="image/jpeg"/><svg:title>https://images.openai.com/static-rsc-4/13JzlzWZEPmMijrHU7hfCIDwCB7wooO7r5X4L70UTVe3GAs454oF3G-3LOgKBeVL5EVqB_9Mx9LgBzE4QLFr2gybcjL200y_fjkMIMmEEnc4KtTQRuP2lTyKadcbNTnSPM3-65pnTeW4U0RDUs2WDPJOxsTDA2Lcj139PoEzPQdacOh5-ptEZD-5KGsMobXk?purpose=fullsize</svg:title></draw:frame></text:p>
      <text:p text:style-name="P4"><text:soft-page-break/><draw:frame draw:style-name="fr2" draw:name="Image2" text:anchor-type="as-char" svg:width="5.6772in" svg:height="8.3335in" draw:z-index="1"><draw:image xlink:href="Pictures/100000000000022100000320FDE3E07E.jpg" xlink:type="simple" xlink:show="embed" xlink:actuate="onLoad" draw:mime-type="image/jpeg"/><svg:title>https://images.openai.com/static-rsc-4/zXuMLB0u-aa4c1mgu2tOLzxLpu8TE7R2n6N76t1k1T60PyAPA5Va2jzxNlNpl4paTsiedHJAyTT2U26pcy2i-C7ngeReWhGJsNrxlkBBNG8mh3kEImvlER6v6Ji8EAC6x2a8pU2i83ypzFqaTrscwQ1Ka9yCxBO2nwDFqU9GxL4k9A_q4eKUduuCYFzPlHYQ?purpose=fullsize</svg:title></draw:frame></text:p>
      <text:p text:style-name="P4"><text:soft-page-break/><draw:frame draw:style-name="fr1" draw:name="Image3" text:anchor-type="as-char" svg:width="6.578in" svg:height="4.7299in" draw:z-index="2"><draw:image xlink:href="Pictures/10000000000004AC0000035C0C0DF8F8.jpg" xlink:type="simple" xlink:show="embed" xlink:actuate="onLoad" draw:mime-type="image/jpeg"/><svg:title>https://images.openai.com/static-rsc-4/wAI7tpmNlxJmA-QoheUP_kAg4ezSv_5VzWvCTdN9VaUfWsTwAotYY1_qI_q1MK9RQthB33HusaosJLRAvwV_djyTd1akai0cZah1mIGM93R-Cr09zP5FH6bBbYRLteEJClBjXKG3D39yTSRQzZxNPvijk_qEBBMXtNPKv82uFfXBYeuK_ijWIQFAO6IQv01k?purpose=fullsize</svg:title></draw:frame></text:p>
      <text:p text:style-name="P4">6</text:p>
      <text:p text:style-name="Horizontal_20_Line"/>
      <text:h text:style-name="Heading_20_2" text:outline-level="2">4. Circuit Connections</text:h>
      <text:h text:style-name="Heading_20_3" text:outline-level="3">RGB LED (Common Cathode):</text:h>
      <text:list text:style-name="L9">
        <text:list-item>
          <text:p text:style-name="P20"><text:span text:style-name="Strong_20_Emphasis">Red pin</text:span> → Arduino pin 6 (via 220Ω resistor) </text:p>
        </text:list-item>
        <text:list-item>
          <text:p text:style-name="P20"><text:span text:style-name="Strong_20_Emphasis">Green pin</text:span> → Arduino pin 5 (via 220Ω resistor) </text:p>
        </text:list-item>
        <text:list-item>
          <text:p text:style-name="P20"><text:span text:style-name="Strong_20_Emphasis">Blue pin</text:span> → Arduino pin 3 (via 220Ω resistor) </text:p>
        </text:list-item>
        <text:list-item>
          <text:p text:style-name="P19"><text:span text:style-name="Strong_20_Emphasis">Common Cathode (longest pin)</text:span> → GND </text:p>
        </text:list-item>
      </text:list>
      <text:p text:style-name="Horizontal_20_Line"/>
      <text:h text:style-name="Heading_20_2" text:outline-level="2">5. Arduino Program</text:h>
      <text:section text:style-name="Sect1" text:name="code-block-viewer">
        <text:p text:style-name="P1">int red_pin = 6;</text:p>
        <text:p text:style-name="Preformatted_20_Text">int green_pin = 5;</text:p>
        <text:p text:style-name="Preformatted_20_Text">int blue_pin = 3;</text:p>
        <text:p text:style-name="Preformatted_20_Text">void setup(){</text:p>
        <text:p text:style-name="Preformatted_20_Text"><text:s text:c="2"/>pinMode(red_pin, OUTPUT);</text:p>
        <text:p text:style-name="Preformatted_20_Text"><text:s text:c="2"/>pinMode(green_pin, OUTPUT);</text:p>
        <text:p text:style-name="Preformatted_20_Text"><text:s text:c="2"/>pinMode(blue_pin, OUTPUT);</text:p>
        <text:p text:style-name="Preformatted_20_Text"><text:s text:c="2"/>Serial.begin(9600);</text:p>
        <text:p text:style-name="Preformatted_20_Text">}</text:p>
        <text:p text:style-name="Preformatted_20_Text">void loop(){</text:p>
        <text:p text:style-name="Preformatted_20_Text"><text:s text:c="2"/>// Red Light</text:p>
        <text:p text:style-name="Preformatted_20_Text"><text:s text:c="2"/>analogWrite(red_pin, 0);</text:p>
        <text:p text:style-name="Preformatted_20_Text"><text:s text:c="2"/>analogWrite(green_pin, 255);</text:p>
        <text:p text:style-name="Preformatted_20_Text"><text:soft-page-break/><text:s text:c="2"/>analogWrite(blue_pin, 255);</text:p>
        <text:p text:style-name="Preformatted_20_Text"><text:s text:c="2"/>delay(1000);</text:p>
        <text:p text:style-name="Preformatted_20_Text"><text:s text:c="2"/>// Green Light</text:p>
        <text:p text:style-name="Preformatted_20_Text"><text:s text:c="2"/>analogWrite(red_pin, 255);</text:p>
        <text:p text:style-name="Preformatted_20_Text"><text:s text:c="2"/>analogWrite(green_pin, 0);</text:p>
        <text:p text:style-name="Preformatted_20_Text"><text:s text:c="2"/>analogWrite(blue_pin, 255);</text:p>
        <text:p text:style-name="Preformatted_20_Text"><text:s text:c="2"/>delay(1000);</text:p>
        <text:p text:style-name="Preformatted_20_Text"><text:s text:c="2"/>// Blue Light</text:p>
        <text:p text:style-name="Preformatted_20_Text"><text:s text:c="2"/>analogWrite(red_pin, 255);</text:p>
        <text:p text:style-name="Preformatted_20_Text"><text:s text:c="2"/>analogWrite(green_pin, 255);</text:p>
        <text:p text:style-name="Preformatted_20_Text"><text:s text:c="2"/>analogWrite(blue_pin, 0);</text:p>
        <text:p text:style-name="Preformatted_20_Text"><text:s text:c="2"/>delay(1000);</text:p>
        <text:p text:style-name="Preformatted_20_Text"><text:s text:c="2"/>// Yellow Light</text:p>
        <text:p text:style-name="Preformatted_20_Text"><text:s text:c="2"/>analogWrite(red_pin, 0);</text:p>
        <text:p text:style-name="Preformatted_20_Text"><text:s text:c="2"/>analogWrite(green_pin, 0);</text:p>
        <text:p text:style-name="Preformatted_20_Text"><text:s text:c="2"/>analogWrite(blue_pin, 255);</text:p>
        <text:p text:style-name="Preformatted_20_Text"><text:s text:c="2"/>delay(1000);</text:p>
        <text:p text:style-name="Preformatted_20_Text"><text:s text:c="2"/>// Purple Light</text:p>
        <text:p text:style-name="Preformatted_20_Text"><text:s text:c="2"/>analogWrite(red_pin, 0);</text:p>
        <text:p text:style-name="Preformatted_20_Text"><text:s text:c="2"/>analogWrite(green_pin, 255);</text:p>
        <text:p text:style-name="Preformatted_20_Text"><text:s text:c="2"/>analogWrite(blue_pin, 0);</text:p>
        <text:p text:style-name="Preformatted_20_Text"><text:s text:c="2"/>delay(1000);</text:p>
        <text:p text:style-name="Preformatted_20_Text"><text:s text:c="2"/>// White Light</text:p>
        <text:p text:style-name="Preformatted_20_Text"><text:s text:c="2"/>analogWrite(red_pin, 0);</text:p>
        <text:p text:style-name="Preformatted_20_Text"><text:s text:c="2"/>analogWrite(green_pin, 0);</text:p>
        <text:p text:style-name="Preformatted_20_Text"><text:s text:c="2"/>analogWrite(blue_pin, 0);</text:p>
        <text:p text:style-name="Preformatted_20_Text"><text:s text:c="2"/>delay(1000);</text:p>
        <text:p text:style-name="Preformatted_20_Text">}</text:p>
      </text:section>
      <text:p text:style-name="Horizontal_20_Line"/>
      <text:h text:style-name="Heading_20_2" text:outline-level="2">⚠️ Important Note</text:h>
      <text:p text:style-name="Text_20_body">This code assumes a <text:span text:style-name="Strong_20_Emphasis">Common Cathode RGB LED</text:span> where:</text:p>
      <text:list text:style-name="L10">
        <text:list-item>
          <text:p text:style-name="P22"><text:span text:style-name="Source_20_Text">0</text:span> → ON </text:p>
        </text:list-item>
        <text:list-item>
          <text:p text:style-name="P21"><text:span text:style-name="Source_20_Text">255</text:span> → OFF </text:p>
        </text:list-item>
      </text:list>
      <text:p text:style-name="Text_20_body">👉 If using <text:span text:style-name="Strong_20_Emphasis">Common Anode</text:span>, logic will be reversed.</text:p>
      <text:p text:style-name="Horizontal_20_Line"/>
      <text:h text:style-name="Heading_20_2" text:outline-level="2">6. Working Principle</text:h>
      <text:list text:style-name="L11">
        <text:list-item>
          <text:p text:style-name="P24">RGB LED produces colors by mixing Red, Green, and Blue light. </text:p>
        </text:list-item>
        <text:list-item>
          <text:p text:style-name="P24">Arduino uses <text:span text:style-name="Strong_20_Emphasis">PWM (Pulse Width Modulation)</text:span> via <text:span text:style-name="Source_20_Text">analogWrite()</text:span> to control brightness. </text:p>
        </text:list-item>
        <text:list-item>
          <text:p text:style-name="P24">Values range from <text:span text:style-name="Strong_20_Emphasis">0 to 255</text:span>: </text:p>
          <text:list>
            <text:list-item>
              <text:p text:style-name="P24">0 → Full brightness </text:p>
            </text:list-item>
            <text:list-item>
              <text:p text:style-name="P24">255 → OFF (for common cathode in your wiring logic) </text:p>
            </text:list-item>
          </text:list>
        </text:list-item>
        <text:list-item>
          <text:p text:style-name="P23">By combining different intensities, multiple colors are generated. </text:p>
        </text:list-item>
      </text:list>
      <text:p text:style-name="Horizontal_20_Line"/>
      <text:h text:style-name="Heading_20_2" text:outline-level="2">7. Output</text:h>
      <text:p text:style-name="Text_20_body">The RGB LED will glow in sequence:</text:p>
      <text:list text:style-name="L12">
        <text:list-item>
          <text:p text:style-name="P26"><text:soft-page-break/>Red </text:p>
        </text:list-item>
        <text:list-item>
          <text:p text:style-name="P26">Green </text:p>
        </text:list-item>
        <text:list-item>
          <text:p text:style-name="P26">Blue </text:p>
        </text:list-item>
        <text:list-item>
          <text:p text:style-name="P26">Yellow </text:p>
        </text:list-item>
        <text:list-item>
          <text:p text:style-name="P26">Purple </text:p>
        </text:list-item>
        <text:list-item>
          <text:p text:style-name="P25">White </text:p>
        </text:list-item>
      </text:list>
      <text:p text:style-name="Text_20_body">Each color appears for 1 second.</text:p>
      <text:p text:style-name="Horizontal_20_Line"/>
      <text:h text:style-name="Heading_20_2" text:outline-level="2">8. Precautions</text:h>
      <text:list text:style-name="L13">
        <text:list-item>
          <text:p text:style-name="P28">Always use resistors with RGB LED pins. </text:p>
        </text:list-item>
        <text:list-item>
          <text:p text:style-name="P28">Ensure correct identification of RGB pins. </text:p>
        </text:list-item>
        <text:list-item>
          <text:p text:style-name="P28">Use PWM pins (3, 5, 6 are correct). </text:p>
        </text:list-item>
        <text:list-item>
          <text:p text:style-name="P27">Check whether LED is common cathode or anode. </text:p>
        </text:list-item>
      </text:list>
      <text:p text:style-name="Horizontal_20_Line"/>
      <text:h text:style-name="Heading_20_2" text:outline-level="2">9. Troubleshooting</text:h>
      <text:p text:style-name="Text_20_body">Problem: Wrong colors displayed<text:line-break/>Solution: Check pin connections or LED type</text:p>
      <text:p text:style-name="Text_20_body">Problem: LED not glowing<text:line-break/>Solution: Verify wiring and resistor connections</text:p>
      <text:p text:style-name="Text_20_body">Problem: Colors too dim<text:line-break/>Solution: Adjust PWM values</text:p>
      <text:p text:style-name="Text_20_body">Problem: Only one color works<text:line-break/>Solution: Check individual LED pins</text:p>
      <text:p text:style-name="Horizontal_20_Line"/>
      <text:h text:style-name="Heading_20_2" text:outline-level="2">🔥 Improvement Ideas</text:h>
      <text:list text:style-name="L14">
        <text:list-item>
          <text:p text:style-name="P30">Smooth color fading (rainbow effect 🌈) </text:p>
        </text:list-item>
        <text:list-item>
          <text:p text:style-name="P30">Control color using Serial input </text:p>
        </text:list-item>
        <text:list-item>
          <text:p text:style-name="P30">Add potentiometer to control brightness </text:p>
        </text:list-item>
        <text:list-item>
          <text:p text:style-name="P29">Sync with music or sensors 🎵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7:49:33.651108491</meta:creation-date>
    <dc:date>2026-04-04T17:52:58.801191958</dc:date>
    <meta:editing-duration>PT3M25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5" meta:paragraph-count="100" meta:word-count="415" meta:character-count="2678" meta:non-whitespace-character-count="2293"/>
  </office:meta>
</office:document-meta>
</file>