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7000001CB66249100.jpg" manifest:media-type="image/jpeg"/>
  <manifest:file-entry manifest:full-path="Pictures/10000000000005C10000025B3705EF6A.jpg" manifest:media-type="image/jpeg"/>
  <manifest:file-entry manifest:full-path="Pictures/100000000000032000000234B77C8D1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TANDARD OPERATING PROCEDURE (SOP)</text:h>
      <text:h text:style-name="Heading_20_2" text:outline-level="2">Motion Detection using PIR Sensor and Arduino</text:h>
      <text:p text:style-name="Horizontal_20_Line"/>
      <text:h text:style-name="Heading_20_2" text:outline-level="2">1. Objective</text:h>
      <text:p text:style-name="Text_20_body">To detect motion using a PIR sensor and control an LED using Arduino Uno, while displaying status on the Serial Monitor.</text:p>
      <text:p text:style-name="Horizontal_20_Line"/>
      <text:h text:style-name="Heading_20_2" text:outline-level="2">2. Components Required</text:h>
      <text:list text:style-name="L1">
        <text:list-item>
          <text:p text:style-name="P3">Arduino Uno </text:p>
        </text:list-item>
        <text:list-item>
          <text:p text:style-name="P3">PIR Motion Sensor (HC-SR501 or similar) </text:p>
        </text:list-item>
        <text:list-item>
          <text:p text:style-name="P3">LED </text:p>
        </text:list-item>
        <text:list-item>
          <text:p text:style-name="P3">220Ω Resistor </text:p>
        </text:list-item>
        <text:list-item>
          <text:p text:style-name="P3">Breadboard </text:p>
        </text:list-item>
        <text:list-item>
          <text:p text:style-name="P3">Jumper wires </text:p>
        </text:list-item>
        <text:list-item>
          <text:p text:style-name="P2">USB cable </text:p>
        </text:list-item>
      </text:list>
      <text:p text:style-name="Horizontal_20_Line"/>
      <text:h text:style-name="Heading_20_2" text:outline-level="2"><text:soft-page-break/>3. Circuit Diagram</text:h>
      <text:p text:style-name="P4"><draw:frame draw:style-name="fr2" draw:name="Image1" text:anchor-type="as-char" svg:width="6.352in" svg:height="4.4783in" draw:z-index="0"><draw:image xlink:href="Pictures/100000000000032000000234B77C8D1D.jpg" xlink:type="simple" xlink:show="embed" xlink:actuate="onLoad" draw:mime-type="image/jpeg"/><svg:title>https://images.openai.com/static-rsc-4/Ji5XLZ8IfD2CN51tbdMBS4onunk4w5hVMzZURAmdLnxvzM8nszaoaK94SO_HRfeU4sardMXcGQOhLKPzy6-axULkhoTWDT-ybEhDlftSFV7gURpPBrl4uhkcORltnk7GeoIsd4njuE-Pmhkhrk3-h4-1pPGyNNwbposk6riO_lP2Cv4aeMe3NDJM8H71LDDz?purpose=fullsize</svg:title></draw:frame></text:p>
      <text:p text:style-name="P4"><draw:frame draw:style-name="fr2" draw:name="Image2" text:anchor-type="as-char" svg:width="6.828in" svg:height="2.7953in" draw:z-index="1"><draw:image xlink:href="Pictures/10000000000005C10000025B3705EF6A.jpg" xlink:type="simple" xlink:show="embed" xlink:actuate="onLoad" draw:mime-type="image/jpeg"/><svg:title>https://images.openai.com/static-rsc-4/o_96vLjyeWTQNS_KtSiKtD9SG1eae4O4I9UKHjycv06Hjo-aNZLTq0xyKBckIPj5JBwdBaIalDpUZOhiK6r4eD_fR9CRxWSmgDqB9yj4xH484B5MNvRsUoPNPYYo8A1a9dctszMdFeREuoGlTXYqaTOyxoQMcm3_ZdR_b_pJ_ixkFR7GS9cbpX3o-Nov68TS?purpose=fullsize</svg:title></draw:frame></text:p>
      <text:p text:style-name="P4"><text:soft-page-break/><draw:frame draw:style-name="fr1" draw:name="Image3" text:anchor-type="as-char" svg:width="6.2398in" svg:height="4.7811in" draw:z-index="2"><draw:image xlink:href="Pictures/1000000000000257000001CB66249100.jpg" xlink:type="simple" xlink:show="embed" xlink:actuate="onLoad" draw:mime-type="image/jpeg"/><svg:title>https://images.openai.com/static-rsc-4/LEMRGWdYy7F-0atHb-cTtePMuzu-FGb8xqQsz1pyzM_bOd0pEaAaXdxuGEYgEzbkdOk6o8TbZsLNiZmXVWTutweUEM62kjx_wTiG0G_V4joXn3XTpUVpQGijSVsItJkQbv6HxdUuc_4dz7O-n4uKV8rCZmFMY7BjejHiI828_wg8qXTs9WIw3fS6ZuhpHDCZ?purpose=fullsize</svg:title></draw:frame></text:p>
      <text:p text:style-name="P4">6</text:p>
      <text:p text:style-name="Horizontal_20_Line"/>
      <text:h text:style-name="Heading_20_2" text:outline-level="2">4. Circuit Connections</text:h>
      <text:h text:style-name="Heading_20_3" text:outline-level="3">PIR Sensor:</text:h>
      <text:list text:style-name="L2">
        <text:list-item>
          <text:p text:style-name="P6">VCC → 5V </text:p>
        </text:list-item>
        <text:list-item>
          <text:p text:style-name="P6">GND → GND </text:p>
        </text:list-item>
        <text:list-item>
          <text:p text:style-name="P5">OUT → Arduino pin 2 </text:p>
        </text:list-item>
      </text:list>
      <text:h text:style-name="Heading_20_3" text:outline-level="3">LED:</text:h>
      <text:list text:style-name="L3">
        <text:list-item>
          <text:p text:style-name="P8">Anode (+) → Arduino pin 3 </text:p>
        </text:list-item>
        <text:list-item>
          <text:p text:style-name="P7">Cathode (–) → GND through 220Ω resistor </text:p>
        </text:list-item>
      </text:list>
      <text:p text:style-name="Horizontal_20_Line"/>
      <text:h text:style-name="Heading_20_2" text:outline-level="2">5. Arduino Program</text:h>
      <text:section text:style-name="Sect1" text:name="code-block-viewer">
        <text:p text:style-name="P1">int pir_output = 2;</text:p>
        <text:p text:style-name="Preformatted_20_Text">int led_pin = 3;</text:p>
        <text:p text:style-name="Preformatted_20_Text">void setup(){</text:p>
        <text:p text:style-name="Preformatted_20_Text"><text:s text:c="2"/>pinMode(pir_output, INPUT);</text:p>
        <text:p text:style-name="Preformatted_20_Text"><text:s text:c="2"/>pinMode(led_pin, OUTPUT);</text:p>
        <text:p text:style-name="Preformatted_20_Text"><text:s text:c="2"/>Serial.begin(9600);</text:p>
        <text:p text:style-name="Preformatted_20_Text">}</text:p>
        <text:p text:style-name="Preformatted_20_Text">void loop(){</text:p>
        <text:p text:style-name="Preformatted_20_Text"><text:soft-page-break/><text:s text:c="2"/>int res = digitalRead(pir_output);</text:p>
        <text:p text:style-name="Preformatted_20_Text"><text:s text:c="2"/>if(res == 1){</text:p>
        <text:p text:style-name="Preformatted_20_Text"><text:s text:c="4"/>Serial.println("Motion detected");</text:p>
        <text:p text:style-name="Preformatted_20_Text"><text:s text:c="4"/>digitalWrite(led_pin, HIGH);</text:p>
        <text:p text:style-name="Preformatted_20_Text"><text:s text:c="2"/>}</text:p>
        <text:p text:style-name="Preformatted_20_Text"><text:s text:c="2"/>else{</text:p>
        <text:p text:style-name="Preformatted_20_Text"><text:s text:c="4"/>Serial.println("No Motion detected");</text:p>
        <text:p text:style-name="Preformatted_20_Text"><text:s text:c="4"/>digitalWrite(led_pin, LOW);</text:p>
        <text:p text:style-name="Preformatted_20_Text"><text:s text:c="2"/>}</text:p>
        <text:p text:style-name="Preformatted_20_Text"><text:s text:c="2"/>delay(1000);</text:p>
        <text:p text:style-name="Preformatted_20_Text">}</text:p>
      </text:section>
      <text:p text:style-name="Horizontal_20_Line"/>
      <text:h text:style-name="Heading_20_2" text:outline-level="2">6. Working Principle</text:h>
      <text:list text:style-name="L4">
        <text:list-item>
          <text:p text:style-name="P10">The PIR sensor detects infrared radiation changes caused by human movement. </text:p>
        </text:list-item>
        <text:list-item>
          <text:p text:style-name="P10">When motion is detected, the sensor outputs HIGH (1). </text:p>
        </text:list-item>
        <text:list-item>
          <text:p text:style-name="P10">Arduino reads this signal using <text:span text:style-name="Source_20_Text">digitalRead()</text:span>. </text:p>
        </text:list-item>
        <text:list-item>
          <text:p text:style-name="P10">If motion is detected: </text:p>
          <text:list>
            <text:list-item>
              <text:p text:style-name="P10">LED turns ON </text:p>
            </text:list-item>
            <text:list-item>
              <text:p text:style-name="P10">Message “Motion detected” is displayed on Serial Monitor </text:p>
            </text:list-item>
          </text:list>
        </text:list-item>
        <text:list-item>
          <text:p text:style-name="P10">If no motion: </text:p>
          <text:list>
            <text:list-item>
              <text:p text:style-name="P10">LED turns OFF </text:p>
            </text:list-item>
            <text:list-item>
              <text:p text:style-name="P9">Message “No Motion detected” is displayed </text:p>
            </text:list-item>
          </text:list>
        </text:list-item>
      </text:list>
      <text:p text:style-name="Horizontal_20_Line"/>
      <text:h text:style-name="Heading_20_2" text:outline-level="2">7. Output</text:h>
      <text:list text:style-name="L5">
        <text:list-item>
          <text:p text:style-name="P12">Motion detected → LED ON + Serial Monitor shows “Motion detected” </text:p>
        </text:list-item>
        <text:list-item>
          <text:p text:style-name="P11">No motion → LED OFF + Serial Monitor shows “No Motion detected” </text:p>
        </text:list-item>
      </text:list>
      <text:p text:style-name="Horizontal_20_Line"/>
      <text:h text:style-name="Heading_20_2" text:outline-level="2">8. Precautions</text:h>
      <text:list text:style-name="L6">
        <text:list-item>
          <text:p text:style-name="P14">Ensure correct PIR pin connections (VCC, GND, OUT). </text:p>
        </text:list-item>
        <text:list-item>
          <text:p text:style-name="P14">Wait 30–60 seconds after powering the sensor (initial stabilization). </text:p>
        </text:list-item>
        <text:list-item>
          <text:p text:style-name="P14">Use resistor with LED to prevent damage. </text:p>
        </text:list-item>
        <text:list-item>
          <text:p text:style-name="P13">Avoid placing sensor near heat sources. </text:p>
        </text:list-item>
      </text:list>
      <text:p text:style-name="Horizontal_20_Line"/>
      <text:h text:style-name="Heading_20_2" text:outline-level="2">9. Troubleshooting</text:h>
      <text:p text:style-name="Text_20_body">Problem: Sensor not detecting motion<text:line-break/>Solution: Wait for stabilization and adjust sensitivity</text:p>
      <text:p text:style-name="Text_20_body">Problem: LED always ON<text:line-break/>Solution: Adjust sensitivity/delay knobs on PIR</text:p>
      <text:p text:style-name="Text_20_body">Problem: No Serial output<text:line-break/>Solution: Check baud rate (9600) and COM port</text:p>
      <text:p text:style-name="Text_20_body"><text:soft-page-break/>Problem: False triggering<text:line-break/>Solution: Reduce sensitivity or change position</text:p>
      <text:p text:style-name="Horizontal_20_Line"/>
      <text:h text:style-name="Heading_20_2" text:outline-level="2">🔥 Extra Tips</text:h>
      <text:list text:style-name="L7">
        <text:list-item>
          <text:p text:style-name="P16">PIR sensor has 2 knobs: </text:p>
          <text:list>
            <text:list-item>
              <text:p text:style-name="P16">Sensitivity adjustment </text:p>
            </text:list-item>
            <text:list-item>
              <text:p text:style-name="P16">Delay time adjustment </text:p>
            </text:list-item>
          </text:list>
        </text:list-item>
        <text:list-item>
          <text:p text:style-name="P15">You can remove <text:span text:style-name="Source_20_Text">delay(1000)</text:span> for faster detection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4T17:49:33.651108491</meta:creation-date>
    <dc:date>2026-04-04T17:50:54.672256682</dc:date>
    <meta:editing-duration>PT1M21S</meta:editing-duration>
    <meta:editing-cycles>1</meta:editing-cycles>
    <meta:document-statistic meta:table-count="0" meta:image-count="3" meta:object-count="0" meta:page-count="5" meta:paragraph-count="73" meta:word-count="340" meta:character-count="2074" meta:non-whitespace-character-count="1773"/>
    <meta:generator>LibreOffice/24.2.7.2$Linux_X86_64 LibreOffice_project/420$Build-2</meta:generator>
  </office:meta>
</office:document-meta>
</file>